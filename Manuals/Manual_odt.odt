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adornments="Bold" style:font-pitch="fixed"/>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1049in" table:align="margins"/>
    </style:style>
    <style:style style:name="Table1.A" style:family="table-column">
      <style:table-column-properties style:column-width="3.8208in" style:rel-column-width="13106*"/>
    </style:style>
    <style:style style:name="Table1.B" style:family="table-column">
      <style:table-column-properties style:column-width="3.8208in" style:rel-column-width="13107*"/>
    </style:style>
    <style:style style:name="Table1.D" style:family="table-column">
      <style:table-column-properties style:column-width="7.6424in" style:rel-column-width="26216*"/>
    </style:style>
    <style:style style:name="Table1.A1" style:family="table-cell">
      <style:table-cell-properties fo:padding="0in" fo:border="none" style:writing-mode="page"/>
    </style:style>
    <style:style style:name="Table2" style:family="table">
      <style:table-properties style:width="19.1049in" table:align="margins"/>
    </style:style>
    <style:style style:name="Table2.A" style:family="table-column">
      <style:table-column-properties style:column-width="4.7757in" style:rel-column-width="16382*"/>
    </style:style>
    <style:style style:name="Table2.D" style:family="table-column">
      <style:table-column-properties style:column-width="4.7778in" style:rel-column-width="16389*"/>
    </style:style>
    <style:style style:name="Table2.A1" style:family="table-cell">
      <style:table-cell-properties fo:padding="0in" fo:border="none" style:writing-mode="page"/>
    </style:style>
    <style:style style:name="P1" style:family="paragraph" style:parent-style-name="Standard">
      <style:text-properties officeooo:rsid="007c67d1" officeooo:paragraph-rsid="007c67d1"/>
    </style:style>
    <style:style style:name="P2" style:family="paragraph" style:parent-style-name="Title">
      <style:text-properties fo:color="#ffffff" loext:opacity="100%" fo:font-size="32pt" officeooo:rsid="002b6bd6" officeooo:paragraph-rsid="002b6bd6" style:font-size-asian="32pt" style:font-size-complex="32pt"/>
    </style:style>
    <style:style style:name="P3" style:family="paragraph" style:parent-style-name="Subtitle">
      <style:text-properties fo:color="#ffffff" loext:opacity="100%"/>
    </style:style>
    <style:style style:name="P4" style:family="paragraph" style:parent-style-name="Standard">
      <style:paragraph-properties fo:text-align="start" style:justify-single-word="false"/>
      <style:text-properties fo:color="#ffffff" loext:opacity="100%" officeooo:rsid="002c7447" officeooo:paragraph-rsid="002c7447"/>
    </style:style>
    <style:style style:name="P5" style:family="paragraph" style:parent-style-name="Standard">
      <style:paragraph-properties fo:text-align="start" style:justify-single-word="false"/>
      <style:text-properties fo:color="#ffffff" loext:opacity="100%" officeooo:rsid="002ed6c3" officeooo:paragraph-rsid="002ed6c3"/>
    </style:style>
    <style:style style:name="P6" style:family="paragraph" style:parent-style-name="Standard">
      <style:paragraph-properties fo:text-align="start" style:justify-single-word="false"/>
      <style:text-properties fo:color="#ffffff" loext:opacity="100%" officeooo:rsid="002ed6c3" officeooo:paragraph-rsid="00448500"/>
    </style:style>
    <style:style style:name="P7" style:family="paragraph" style:parent-style-name="Standard">
      <style:paragraph-properties fo:text-align="start" style:justify-single-word="false"/>
      <style:text-properties fo:color="#ffffff" loext:opacity="100%" officeooo:rsid="00448500" officeooo:paragraph-rsid="00448500"/>
    </style:style>
    <style:style style:name="P8" style:family="paragraph" style:parent-style-name="Standard">
      <style:paragraph-properties fo:text-align="start" style:justify-single-word="false"/>
      <style:text-properties fo:color="#ffffff" loext:opacity="100%" officeooo:rsid="002c7447" officeooo:paragraph-rsid="002ed6c3"/>
    </style:style>
    <style:style style:name="P9" style:family="paragraph" style:parent-style-name="Standard">
      <style:paragraph-properties fo:text-align="start" style:justify-single-word="false"/>
      <style:text-properties fo:color="#ffffff" loext:opacity="100%" officeooo:rsid="002c7447" officeooo:paragraph-rsid="0045bb28"/>
    </style:style>
    <style:style style:name="P10" style:family="paragraph" style:parent-style-name="Standard">
      <style:paragraph-properties fo:text-align="start" style:justify-single-word="false" fo:break-before="page"/>
      <style:text-properties fo:color="#ffffff" loext:opacity="100%" officeooo:rsid="00326709" officeooo:paragraph-rsid="00326709"/>
    </style:style>
    <style:style style:name="P11" style:family="paragraph" style:parent-style-name="Horizontal_20_Line">
      <style:text-properties officeooo:rsid="007c67d1"/>
    </style:style>
    <style:style style:name="P12" style:family="paragraph" style:parent-style-name="Title">
      <style:text-properties fo:color="#ffffff" loext:opacity="100%" officeooo:rsid="002f34fa" officeooo:paragraph-rsid="002f34fa"/>
    </style:style>
    <style:style style:name="P13" style:family="paragraph" style:parent-style-name="Text_20_body">
      <style:text-properties fo:color="#ffffff" loext:opacity="100%" officeooo:rsid="003e22e5" officeooo:paragraph-rsid="003e22e5"/>
    </style:style>
    <style:style style:name="P14" style:family="paragraph" style:parent-style-name="Text_20_body">
      <style:text-properties fo:color="#ffffff" loext:opacity="100%" officeooo:rsid="002f34fa" officeooo:paragraph-rsid="002f34fa"/>
    </style:style>
    <style:style style:name="P15" style:family="paragraph" style:parent-style-name="Text_20_body">
      <style:text-properties fo:color="#ffffff" loext:opacity="100%" officeooo:rsid="002fda4e" officeooo:paragraph-rsid="002fda4e"/>
    </style:style>
    <style:style style:name="P16" style:family="paragraph" style:parent-style-name="Text_20_body">
      <style:text-properties fo:color="#ffffff" loext:opacity="100%" officeooo:rsid="002ffbf3" officeooo:paragraph-rsid="002ffbf3"/>
    </style:style>
    <style:style style:name="P17" style:family="paragraph" style:parent-style-name="Text_20_body">
      <style:text-properties fo:color="#ffffff" loext:opacity="100%" officeooo:rsid="003095e7" officeooo:paragraph-rsid="003095e7"/>
    </style:style>
    <style:style style:name="P18" style:family="paragraph" style:parent-style-name="Text_20_body">
      <style:text-properties fo:color="#ffffff" loext:opacity="100%" officeooo:rsid="0032f2b7" officeooo:paragraph-rsid="0032f2b7"/>
    </style:style>
    <style:style style:name="P19" style:family="paragraph" style:parent-style-name="Subtitle">
      <style:text-properties fo:color="#ffffff" loext:opacity="100%" officeooo:rsid="0034224e" officeooo:paragraph-rsid="0034224e"/>
    </style:style>
    <style:style style:name="P20" style:family="paragraph" style:parent-style-name="Text_20_body">
      <style:text-properties fo:color="#ffffff" loext:opacity="100%" officeooo:rsid="0034224e" officeooo:paragraph-rsid="0034224e"/>
    </style:style>
    <style:style style:name="P21" style:family="paragraph" style:parent-style-name="Text_20_body">
      <style:text-properties officeooo:rsid="0034224e" officeooo:paragraph-rsid="0034224e"/>
    </style:style>
    <style:style style:name="P22" style:family="paragraph" style:parent-style-name="Text_20_body">
      <style:text-properties fo:color="#ffffff" loext:opacity="100%" officeooo:rsid="003fd0be" officeooo:paragraph-rsid="003fd0be"/>
    </style:style>
    <style:style style:name="P23" style:family="paragraph" style:parent-style-name="Subtitle">
      <style:text-properties fo:color="#ffffff" loext:opacity="100%" officeooo:rsid="0036aebd" officeooo:paragraph-rsid="0036aebd"/>
    </style:style>
    <style:style style:name="P24" style:family="paragraph" style:parent-style-name="Text_20_body">
      <style:text-properties fo:color="#ffffff" loext:opacity="100%" officeooo:rsid="0036aebd" officeooo:paragraph-rsid="0036aebd"/>
    </style:style>
    <style:style style:name="P25" style:family="paragraph" style:parent-style-name="Text_20_body" style:list-style-name="L1">
      <style:text-properties fo:color="#ffffff" loext:opacity="100%" officeooo:rsid="0036aebd" officeooo:paragraph-rsid="0036aebd"/>
    </style:style>
    <style:style style:name="P26" style:family="paragraph" style:parent-style-name="Horizontal_20_Line">
      <style:paragraph-properties fo:break-before="page"/>
    </style:style>
    <style:style style:name="P27" style:family="paragraph" style:parent-style-name="Title">
      <style:text-properties fo:color="#ffffff" loext:opacity="100%" officeooo:rsid="00326709" officeooo:paragraph-rsid="00326709"/>
    </style:style>
    <style:style style:name="P28" style:family="paragraph" style:parent-style-name="Text_20_body">
      <style:text-properties fo:color="#ffffff" loext:opacity="100%" officeooo:rsid="003a5167" officeooo:paragraph-rsid="003a5167"/>
    </style:style>
    <style:style style:name="P29" style:family="paragraph" style:parent-style-name="Text_20_body">
      <style:text-properties fo:color="#ffffff" loext:opacity="100%" officeooo:rsid="004fe15a" officeooo:paragraph-rsid="004fe15a"/>
    </style:style>
    <style:style style:name="P30" style:family="paragraph" style:parent-style-name="Subtitle">
      <style:text-properties fo:color="#ffffff" loext:opacity="100%" officeooo:rsid="00448500" officeooo:paragraph-rsid="00448500"/>
    </style:style>
    <style:style style:name="P31" style:family="paragraph" style:parent-style-name="Text_20_body">
      <style:text-properties fo:color="#ffffff" loext:opacity="100%" officeooo:rsid="0043bf29" officeooo:paragraph-rsid="0043bf29"/>
    </style:style>
    <style:style style:name="P32" style:family="paragraph" style:parent-style-name="Subtitle">
      <style:text-properties fo:color="#ffffff" loext:opacity="100%" officeooo:rsid="0040ec3f" officeooo:paragraph-rsid="0040ec3f"/>
    </style:style>
    <style:style style:name="P33" style:family="paragraph" style:parent-style-name="Text_20_body">
      <style:text-properties fo:color="#ffffff" loext:opacity="100%" officeooo:rsid="00544178" officeooo:paragraph-rsid="00544178"/>
    </style:style>
    <style:style style:name="P34" style:family="paragraph" style:parent-style-name="Text_20_body">
      <style:text-properties fo:color="#ffffff" loext:opacity="100%" officeooo:rsid="005252c1" officeooo:paragraph-rsid="0055b3da"/>
    </style:style>
    <style:style style:name="P35" style:family="paragraph" style:parent-style-name="Text_20_body">
      <style:text-properties fo:color="#ffffff" loext:opacity="100%" officeooo:rsid="005252c1" officeooo:paragraph-rsid="005252c1"/>
    </style:style>
    <style:style style:name="P36" style:family="paragraph" style:parent-style-name="Text_20_body">
      <style:text-properties fo:color="#ffffff" loext:opacity="100%" officeooo:rsid="0040ec3f" officeooo:paragraph-rsid="005252c1"/>
    </style:style>
    <style:style style:name="P37" style:family="paragraph" style:parent-style-name="Text_20_body">
      <style:text-properties fo:color="#ffffff" loext:opacity="100%" officeooo:rsid="00413ce0" officeooo:paragraph-rsid="005252c1"/>
    </style:style>
    <style:style style:name="P38" style:family="paragraph" style:parent-style-name="Text_20_body">
      <style:text-properties fo:color="#ffffff" loext:opacity="100%" officeooo:rsid="0041865b" officeooo:paragraph-rsid="005252c1"/>
    </style:style>
    <style:style style:name="P39" style:family="paragraph" style:parent-style-name="Text_20_body">
      <style:text-properties fo:color="#ffffff" loext:opacity="100%" officeooo:rsid="0056f0a5" officeooo:paragraph-rsid="0056f0a5"/>
    </style:style>
    <style:style style:name="P40" style:family="paragraph" style:parent-style-name="Title">
      <style:text-properties fo:color="#ffffff" loext:opacity="100%" fo:font-size="24pt" fo:font-weight="bold" style:font-size-asian="24pt" style:font-weight-asian="bold" style:font-size-complex="24pt" style:font-weight-complex="bold"/>
    </style:style>
    <style:style style:name="P41" style:family="paragraph" style:parent-style-name="Subtitle">
      <style:text-properties fo:color="#ffffff" loext:opacity="100%" officeooo:rsid="0058fed5" officeooo:paragraph-rsid="0058fed5"/>
    </style:style>
    <style:style style:name="P42" style:family="paragraph" style:parent-style-name="Text_20_body">
      <style:text-properties fo:color="#ffffff" loext:opacity="100%" officeooo:rsid="005a6143" officeooo:paragraph-rsid="005a6143"/>
    </style:style>
    <style:style style:name="P43" style:family="paragraph" style:parent-style-name="Subtitle">
      <style:text-properties fo:color="#ffffff" loext:opacity="100%" fo:font-size="20pt" officeooo:rsid="0058fed5" officeooo:paragraph-rsid="005a6143" style:font-size-asian="20pt" style:font-size-complex="20pt"/>
    </style:style>
    <style:style style:name="P44" style:family="paragraph" style:parent-style-name="Subtitle">
      <style:text-properties fo:color="#ffffff" loext:opacity="100%" fo:font-size="18pt" officeooo:rsid="0058fed5" officeooo:paragraph-rsid="005a6143" style:font-size-asian="18pt" style:font-size-complex="18pt"/>
    </style:style>
    <style:style style:name="P45" style:family="paragraph" style:parent-style-name="Subtitle">
      <style:text-properties fo:color="#ffffff" loext:opacity="100%" officeooo:rsid="0058fed5" officeooo:paragraph-rsid="005a6143"/>
    </style:style>
    <style:style style:name="P46" style:family="paragraph" style:parent-style-name="Text_20_body">
      <style:text-properties fo:color="#ffffff" loext:opacity="100%" officeooo:rsid="006a3568" officeooo:paragraph-rsid="006a3568"/>
    </style:style>
    <style:style style:name="P47" style:family="paragraph" style:parent-style-name="Table_20_Contents">
      <style:text-properties fo:color="#ffffff" loext:opacity="100%" officeooo:rsid="006bc69d" officeooo:paragraph-rsid="006bc69d" style:font-name-asian="Noto Serif CJK JP" style:font-size-asian="15pt"/>
    </style:style>
    <style:style style:name="P48" style:family="paragraph" style:parent-style-name="Table_20_Contents">
      <style:text-properties fo:color="#ffffff" loext:opacity="100%" style:font-name-asian="Noto Serif CJK JP" style:font-size-asian="15pt"/>
    </style:style>
    <style:style style:name="P49" style:family="paragraph" style:parent-style-name="Table_20_Contents">
      <style:text-properties fo:color="#ffffff" loext:opacity="100%" officeooo:rsid="006a3568" officeooo:paragraph-rsid="006a3568" style:font-name-asian="Noto Serif CJK JP" style:font-size-asian="15pt"/>
    </style:style>
    <style:style style:name="P50" style:family="paragraph" style:parent-style-name="Text_20_body">
      <style:text-properties fo:color="#ffffff" loext:opacity="100%" officeooo:rsid="006cecbd" officeooo:paragraph-rsid="006cecbd"/>
    </style:style>
    <style:style style:name="P51" style:family="paragraph" style:parent-style-name="Table_20_Contents">
      <style:text-properties fo:color="#ffffff" loext:opacity="100%" officeooo:rsid="006cecbd" officeooo:paragraph-rsid="006cecbd" style:font-name-asian="Noto Serif CJK JP" style:font-size-asian="15pt"/>
    </style:style>
    <style:style style:name="P52" style:family="paragraph" style:parent-style-name="Table_20_Contents">
      <style:text-properties fo:color="#ffffff" loext:opacity="100%" officeooo:rsid="006d4c7e" officeooo:paragraph-rsid="006d4c7e" style:font-name-asian="Noto Serif CJK JP" style:font-size-asian="15pt"/>
    </style:style>
    <style:style style:name="P53" style:family="paragraph" style:parent-style-name="Table_20_Contents">
      <style:text-properties fo:color="#ffffff" loext:opacity="100%" officeooo:rsid="006dbf0b" officeooo:paragraph-rsid="006dbf0b" style:font-name-asian="Noto Serif CJK JP" style:font-size-asian="15pt"/>
    </style:style>
    <style:style style:name="P54" style:family="paragraph" style:parent-style-name="Table_20_Contents">
      <style:text-properties fo:color="#ffffff" loext:opacity="100%" officeooo:rsid="007052dd" officeooo:paragraph-rsid="007052dd" style:font-name-asian="Noto Serif CJK JP" style:font-size-asian="15pt"/>
    </style:style>
    <style:style style:name="P55" style:family="paragraph" style:parent-style-name="Table_20_Contents">
      <style:text-properties fo:color="#ffffff" loext:opacity="100%" officeooo:rsid="006ef7da" officeooo:paragraph-rsid="006ef7da" style:font-name-asian="Noto Serif CJK JP" style:font-size-asian="15pt"/>
    </style:style>
    <style:style style:name="P56" style:family="paragraph" style:parent-style-name="Horizontal_20_Line">
      <style:text-properties officeooo:paragraph-rsid="007c67d1"/>
    </style:style>
    <style:style style:name="P57" style:family="paragraph" style:parent-style-name="Standard">
      <style:paragraph-properties fo:break-before="page"/>
      <style:text-properties officeooo:rsid="007c67d1" officeooo:paragraph-rsid="007c67d1"/>
    </style:style>
    <style:style style:name="P58" style:family="paragraph" style:parent-style-name="Text_20_body">
      <style:text-properties fo:color="#ffffff" loext:opacity="100%"/>
    </style:style>
    <style:style style:name="T1" style:family="text">
      <style:text-properties officeooo:rsid="002c7447"/>
    </style:style>
    <style:style style:name="T2" style:family="text">
      <style:text-properties officeooo:rsid="002f34f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448500"/>
    </style:style>
    <style:style style:name="T5" style:family="text">
      <style:text-properties officeooo:rsid="0046ef8c"/>
    </style:style>
    <style:style style:name="T6" style:family="text">
      <style:text-properties fo:font-style="italic" style:font-style-asian="italic" style:font-style-complex="italic"/>
    </style:style>
    <style:style style:name="T7" style:family="text">
      <style:text-properties officeooo:rsid="002fda4e"/>
    </style:style>
    <style:style style:name="T8" style:family="text">
      <style:text-properties officeooo:rsid="00511cdb"/>
    </style:style>
    <style:style style:name="T9" style:family="text">
      <style:text-properties fo:font-style="italic" fo:font-weight="bold" officeooo:rsid="002e38f4" style:font-style-asian="italic" style:font-weight-asian="bold" style:font-style-complex="italic" style:font-weight-complex="bold"/>
    </style:style>
    <style:style style:name="T10" style:family="text">
      <style:text-properties officeooo:rsid="005815c9"/>
    </style:style>
    <style:style style:name="T11" style:family="text">
      <style:text-properties officeooo:rsid="0045bb28"/>
    </style:style>
    <style:style style:name="T12" style:family="text">
      <style:text-properties fo:font-style="italic" fo:font-weight="bold" officeooo:rsid="002dc078" style:font-style-asian="italic" style:font-weight-asian="bold" style:font-style-complex="italic" style:font-weight-complex="bold"/>
    </style:style>
    <style:style style:name="T13" style:family="text">
      <style:text-properties officeooo:rsid="0073ca0f"/>
    </style:style>
    <style:style style:name="T14" style:family="text">
      <style:text-properties officeooo:rsid="002dc078"/>
    </style:style>
    <style:style style:name="T15" style:family="text">
      <style:text-properties fo:language="zxx" fo:country="none" style:language-asian="zxx" style:country-asian="none" style:language-complex="zxx" style:country-complex="none"/>
    </style:style>
    <style:style style:name="T16" style:family="text">
      <style:text-properties officeooo:rsid="0038b880"/>
    </style:style>
    <style:style style:name="T17" style:family="text">
      <style:text-properties officeooo:rsid="0048b163"/>
    </style:style>
    <style:style style:name="T18" style:family="text">
      <style:text-properties officeooo:rsid="002ffbf3"/>
    </style:style>
    <style:style style:name="T19" style:family="text">
      <style:text-properties fo:color="#729fcf" loext:opacity="100%"/>
    </style:style>
    <style:style style:name="T20" style:family="text">
      <style:text-properties fo:color="#729fcf" loext:opacity="100%" officeooo:rsid="00423d07"/>
    </style:style>
    <style:style style:name="T21" style:family="text">
      <style:text-properties fo:font-size="15pt" style:font-size-asian="15pt" style:font-size-complex="15pt"/>
    </style:style>
    <style:style style:name="T22" style:family="text">
      <style:text-properties officeooo:rsid="0040ec3f"/>
    </style:style>
    <style:style style:name="T23" style:family="text">
      <style:text-properties officeooo:rsid="0042b9ba"/>
    </style:style>
    <style:style style:name="T24" style:family="text">
      <style:text-properties officeooo:rsid="00413ce0"/>
    </style:style>
    <style:style style:name="T25" style:family="text">
      <style:text-properties officeooo:rsid="004e6b56"/>
    </style:style>
    <style:style style:name="T26" style:family="text">
      <style:text-properties officeooo:rsid="00438475"/>
    </style:style>
    <style:style style:name="T27" style:family="text">
      <style:text-properties officeooo:rsid="004ab557"/>
    </style:style>
    <style:style style:name="T28" style:family="text">
      <style:text-properties officeooo:rsid="00469b25"/>
    </style:style>
    <style:style style:name="T29" style:family="text">
      <style:text-properties officeooo:rsid="0058fed5"/>
    </style:style>
    <style:style style:name="T30" style:family="text">
      <style:text-properties officeooo:rsid="004a753b"/>
    </style:style>
    <style:style style:name="T31" style:family="text">
      <style:text-properties officeooo:rsid="005484b7"/>
    </style:style>
    <style:style style:name="T32" style:family="text">
      <style:text-properties officeooo:rsid="004102b0"/>
    </style:style>
    <style:style style:name="T33" style:family="text">
      <style:text-properties officeooo:rsid="00532c20"/>
    </style:style>
    <style:style style:name="T34" style:family="text">
      <style:text-properties officeooo:rsid="00544178"/>
    </style:style>
    <style:style style:name="T35" style:family="text">
      <style:text-properties officeooo:rsid="002e38f4"/>
    </style:style>
    <style:style style:name="T36" style:family="text">
      <style:text-properties officeooo:rsid="005a6143"/>
    </style:style>
    <style:style style:name="T37" style:family="text">
      <style:text-properties officeooo:rsid="00644cf8"/>
    </style:style>
    <style:style style:name="T38" style:family="text">
      <style:text-properties officeooo:rsid="005a82cd"/>
    </style:style>
    <style:style style:name="T39" style:family="text">
      <style:text-properties officeooo:rsid="005c16b4"/>
    </style:style>
    <style:style style:name="T40" style:family="text">
      <style:text-properties officeooo:rsid="005d8f16"/>
    </style:style>
    <style:style style:name="T41" style:family="text">
      <style:text-properties officeooo:rsid="005f5f08"/>
    </style:style>
    <style:style style:name="T42" style:family="text">
      <style:text-properties officeooo:rsid="0062e062"/>
    </style:style>
    <style:style style:name="T43" style:family="text">
      <style:text-properties officeooo:rsid="0068090f"/>
    </style:style>
    <style:style style:name="T44" style:family="text">
      <style:text-properties officeooo:rsid="0066342b"/>
    </style:style>
    <style:style style:name="T45" style:family="text">
      <style:text-properties officeooo:rsid="006152ec"/>
    </style:style>
    <style:style style:name="T46" style:family="text">
      <style:text-properties officeooo:rsid="006a07f2"/>
    </style:style>
    <style:style style:name="T47" style:family="text">
      <style:text-properties officeooo:rsid="006a3568"/>
    </style:style>
    <style:style style:name="T48" style:family="text">
      <style:text-properties officeooo:rsid="0071e358"/>
    </style:style>
    <style:style style:name="T49" style:family="text">
      <style:text-properties officeooo:rsid="0072306f"/>
    </style:style>
    <style:style style:name="T50" style:family="text">
      <style:text-properties officeooo:rsid="006ef7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 / X</text:p>
      <text:p text:style-name="P2"><text:span text:style-name="T1">CLoI_CLo</text:span><text:span text:style-name="T2">I</text:span> – CLI – Game manual</text:p>
      <text:p text:style-name="P3">Summary:</text:p>
      <text:p text:style-name="P4"/>
      <text:p text:style-name="P5"><text:span text:style-name="T3">About</text:span><text:tab/><text:tab/><text:tab/><text:tab/><text:tab/><text:tab/><text:tab/><text:tab/><text:tab/><text:tab/><text:tab/><text:tab/><text:tab/>----- (<text:span text:style-name="T2">2</text:span>)</text:p>
      <text:p text:style-name="P6"><text:tab/><text:span text:style-name="T4">Online </text:span><text:span text:style-name="T5">infos</text:span><text:span text:style-name="T4"> and Download Verification</text:span></text:p>
      <text:p text:style-name="P7"><text:tab/>License</text:p>
      <text:p text:style-name="P4"/>
      <text:p text:style-name="P8"><text:span text:style-name="T3">Koikoi rules</text:span><text:span text:style-name="T6"> </text:span><text:tab/><text:tab/><text:tab/><text:tab/><text:tab/><text:tab/><text:tab/><text:tab/><text:tab/><text:tab/><text:tab/><text:tab/>----- (<text:span text:style-name="T7">3</text:span>)</text:p>
      <text:p text:style-name="P8"><text:tab/><text:span text:style-name="T4">Koikoi cards deck</text:span></text:p>
      <text:p text:style-name="P8"><text:tab/><text:span text:style-name="T4">A typical Koikoi </text:span><text:span text:style-name="T8">game</text:span></text:p>
      <text:p text:style-name="P8"/>
      <text:p text:style-name="P9"><text:span text:style-name="T9">Cards and </text:span><text:span text:style-name="T3">Winning combinations (Yaku)</text:span> <text:tab/><text:tab/><text:tab/><text:tab/><text:tab/><text:tab/>----- (<text:span text:style-name="T10">5</text:span>)</text:p>
      <text:p text:style-name="P9"><text:tab/><text:span text:style-name="T11">Standard ASCII art of the cards</text:span></text:p>
      <text:p text:style-name="P8"/>
      <text:p text:style-name="P8"><text:span text:style-name="T12">CLI game commands</text:span> <text:tab/><text:tab/><text:tab/><text:tab/><text:tab/><text:tab/><text:tab/><text:tab/><text:tab/><text:tab/><text:tab/>----- (<text:span text:style-name="T13">9</text:span>)</text:p>
      <text:p text:style-name="P8"/>
      <text:p text:style-name="P8"><text:span text:style-name="T12">Language selection</text:span><text:span text:style-name="T3"> </text:span><text:span text:style-name="T9">and</text:span><text:span text:style-name="T12"> customization</text:span><text:span text:style-name="T14"> <text:tab/><text:tab/><text:tab/><text:tab/><text:tab/><text:tab/><text:tab/></text:span>----- (X)</text:p>
      <text:p text:style-name="P8"/>
      <text:p text:style-name="P8"><text:span text:style-name="T9">ASCII Art customization</text:span> <text:tab/><text:tab/><text:tab/><text:tab/><text:tab/><text:tab/><text:tab/><text:tab/><text:tab/>----- (X)</text:p>
      <text:p text:style-name="P10"/>
      <text:p text:style-name="P11"/>
      <text:p text:style-name="P1">Page 2 / X [ Return to Summary ]</text:p>
      <text:p text:style-name="P12">About</text:p>
      <text:p text:style-name="P13">If you are having problems in displaying the Japanese text or ASCII art We suggest to change from UTF-8 to UTF-16.</text:p>
      <text:p text:style-name="P14">Welcome to <text:span text:style-name="T15">CC (CloI_CLoI)</text:span>. <text:span text:style-name="T16">This manual has been written in LibreOffice and exported as a HTML file.</text:span></text:p>
      <text:p text:style-name="P15">This python based application is a Koi<text:span text:style-name="T17">k</text:span>oi game (3). <text:span text:style-name="T18">The user can play Koi</text:span><text:span text:style-name="T17">k</text:span><text:span text:style-name="T18">oi with the Terminal (in this CLI edition). This application is developed in Debian with python scripts.</text:span></text:p>
      <text:p text:style-name="P16">Modifying the app’s language is possible through the commands or through adding a custom language in the JSON database file (LANG_PAGE); it is also possible to customize the ASCII art of the playing cards (ASCII_PAGE).</text:p>
      <text:p text:style-name="P17">We highly discourage the modification of the game commands, in order to not disrupt any possible update or game functions.</text:p>
      <text:p text:style-name="P18">It is also recommended to keep the UTF-16 universal format.</text:p>
      <text:p text:style-name="P19">Online info<text:span text:style-name="T5">s</text:span>:</text:p>
      <text:p text:style-name="P20">This CLI application is available on the GitHub repository at:</text:p>
      <text:p text:style-name="P21"><text:a xlink:type="simple" xlink:href="https://github.com/user/RedRiotDev/repository/CLoICLoI" text:style-name="Internet_20_link" text:visited-style-name="Visited_20_Internet_20_Link"><text:span text:style-name="T19">https://github.com/user/RedRiotDev/</text:span><text:span text:style-name="T20">repository/CLoICLoI</text:span></text:a></text:p>
      <text:p text:style-name="P22">There you can also find the PGP keys to verify your download.</text:p>
      <text:p text:style-name="P23">License:</text:p>
      <text:p text:style-name="P24">The license used for the software is: XYZ-1234</text:p>
      <text:p text:style-name="P24">The fundamental rules to be applied are:</text:p>
      <text:list text:style-name="L1">
        <text:list-item>
          <text:p text:style-name="P25"/>
        </text:list-item>
      </text:list>
      <text:p text:style-name="P26"/>
      <text:p text:style-name="P1">Page 3 / X [ Return to Summary ]</text:p>
      <text:p text:style-name="P27">Koikoi rules</text:p>
      <text:p text:style-name="P28">Koikoi (<text:span text:style-name="T21">こいこい</text:span>) <text:span text:style-name="T22">is a Japanese </text:span><text:span text:style-name="T23">playing </text:span><text:span text:style-name="T22">card</text:span><text:span text:style-name="T23">s</text:span><text:span text:style-name="T22"> game where the objective is to combine the cards in a specific pattern (not in order) to gain points </text:span><text:span text:style-name="T24">to add to their score </text:span><text:span text:style-name="T22">(文「ぶん」</text:span><text:span text:style-name="T25">bun</text:span><text:span text:style-name="T22">). </text:span><text:span text:style-name="T26">In real life the cards have different front designs while, typically, the rear is black; the dimensions of the cards are smaller than poker cards.</text:span></text:p>
      <text:p text:style-name="P29">The cards used are the Hanafuda (花札「はなふだ」) cards.</text:p>
      <text:p text:style-name="P30">Koikoi cards deck <text:span text:style-name="T27">(CARDS_PAGE)</text:span></text:p>
      <text:p text:style-name="P31">A deck of koikoi cards is made up of <text:span text:style-name="T4">48 </text:span><text:span text:style-name="T28">total </text:span><text:span text:style-name="T4">cards divided by season. </text:span><text:span text:style-name="T28">Each season of the year has </text:span><text:span text:style-name="T29">4 cards that are from</text:span><text:span text:style-name="T28"> </text:span><text:span text:style-name="T30">3</text:span><text:span text:style-name="T28"> </text:span><text:span text:style-name="T30">out of the 4 </text:span><text:span text:style-name="T28">groups of cards: </text:span><text:span text:style-name="T5">bright, animal, ribbon, chaffs ( 1 point ); except December that has one bright card and three chaffs ( 1 point ).</text:span></text:p>
      <text:p text:style-name="P32">A typical Koikoi <text:span text:style-name="T8">game</text:span>:</text:p>
      <text:p text:style-name="P33">In this version of the game each player starts with the score/life of 20文.</text:p>
      <text:p text:style-name="P34">A player starts by choosing between two cards extracted within the deck. After revealing both cards the player who got the lowest number of season (January=1, February=2 etc…) and the highest value (if the seasons are the same) begins the round. <text:span text:style-name="T31">The player starting is called Oya (親「おや」)　the other is called Ko(子 「こ」)</text:span></text:p>
      <text:p text:style-name="P35">Each player begins with 8 cards in their hands and 8 other cards are placed on the table.</text:p>
      <text:p text:style-name="P35">Each round the player chooses which season-card to take with any other season-card there is on the table, then those cards are placed on the “revealed hand” in which the combinations/scores take effect. After this, one other card is extracted from the deck and placed on the table, IF the extracted card is of a season present on the table then those cards are added to the “revealed hand” of the player, until there are no matches made by the table cards the extracted card remains on the table to be in-game on the next turn.</text:p>
      <text:p text:style-name="P36">Immediately after having completed a combination (役「やく」Yaku) the player can decide if they want to continue <text:span text:style-name="T32">(calling koikoi こいこい) </text:span>or pass the turn <text:span text:style-name="T33">(calling shōbu 勝負「しょうぶ」)</text:span>and collect the amount of points the yaku values. By continuing the round you have to possibility to gain more points, (even if not continuing) when you have 7+ points your score will double the value, if the player who continued doesn’t make any points in the round they will gain 0 points meanwhile if the opponent gains points their points will double regardless if they have scored 7+ points. <text:span text:style-name="T34">Otherwise no points are awarded to anyone.</text:span></text:p>
      <text:p text:style-name="P37">The points are transferred from the score/<text:span text:style-name="T34">life (文)</text:span> of the opponent to the winner, the game finishes when one player has reached 0 in the score label.</text:p>
      <text:p text:style-name="P38">Every yaku has a different amount of points assigned (YAKU_PAGE).</text:p>
      <text:p text:style-name="P39">The winner becomes the Oya (dealer) for the next round.</text:p>
      <text:p text:style-name="P26"/>
      <text:p text:style-name="P1">Page 5 / X [ Return to Summary ]</text:p>
      <text:p text:style-name="P40"><text:span text:style-name="T35">Cards and </text:span>Winning combinations (Yaku)</text:p>
      <text:p text:style-name="P41">Season: January – <text:span text:style-name="T36">Pine tree（松「まつ」Matsu）</text:span></text:p>
      <text:p text:style-name="P42"><text:tab/>Cards:</text:p>
      <text:p text:style-name="P42"><text:tab/><text:tab/>Crane and Sun – Light/Bright card <text:span text:style-name="T37">( 20 points )</text:span></text:p>
      <text:p text:style-name="P42"><text:tab/><text:tab/>Anoyoroshi <text:span text:style-name="T38">Poetry</text:span> Red Ribbon ( 5 points )</text:p>
      <text:p text:style-name="P42"><text:tab/><text:tab/>2 chaffs ( 1 point ) <text:span text:style-name="T39">cards</text:span></text:p>
      <text:p text:style-name="P43">Season: <text:span text:style-name="T36">February</text:span> – <text:span text:style-name="T36">Plum blossoms（梅「うめ」Ume）</text:span></text:p>
      <text:p text:style-name="P42"><text:tab/>Cards:</text:p>
      <text:p text:style-name="P42"><text:tab/><text:tab/>Bush warbler – Animal card <text:span text:style-name="T37">( 10 points )</text:span></text:p>
      <text:p text:style-name="P42"><text:tab/><text:tab/>Anoyoroshi <text:span text:style-name="T38">Poetry </text:span>Red Ribbon ( 5 points )</text:p>
      <text:p text:style-name="P42"><text:tab/><text:tab/>2 chaffs ( 1 point )</text:p>
      <text:p text:style-name="P44">Season: <text:span text:style-name="T38">March</text:span> – <text:span text:style-name="T38">Cherry blossoms（桜「さくら」Sakura）</text:span></text:p>
      <text:p text:style-name="P42"><text:tab/>Cards:</text:p>
      <text:p text:style-name="P42"><text:tab/><text:tab/><text:span text:style-name="T38">Curtain - Light ( 20 points )</text:span></text:p>
      <text:p text:style-name="P42"><text:tab/><text:tab/><text:span text:style-name="T38">Mi?na?shino Poetry </text:span>Red Ribbon ( 5 points )</text:p>
      <text:p text:style-name="P42"><text:tab/><text:tab/>2 chaffs ( 1 point )</text:p>
      <text:p text:style-name="P45">Season: <text:span text:style-name="T38">April</text:span> – <text:span text:style-name="T38">Wisteria（藤「ふじ」Fuji）</text:span></text:p>
      <text:p text:style-name="P42"><text:tab/>Cards:</text:p>
      <text:p text:style-name="P42"><text:tab/><text:tab/><text:span text:style-name="T38">Cuckoo - Animal ( 10 points )</text:span></text:p>
      <text:p text:style-name="P42"><text:tab/><text:tab/><text:span text:style-name="T40">Plain </text:span>Red Ribbon ( 5 points )</text:p>
      <text:p text:style-name="P42"><text:tab/><text:tab/>2 chaffs ( 1 point )</text:p>
      <text:p text:style-name="P45">Season: <text:span text:style-name="T38">May</text:span> – <text:span text:style-name="T38">Iris（菖蒲「あやめ」Ayame）</text:span></text:p>
      <text:p text:style-name="P42"><text:tab/>Cards:</text:p>
      <text:p text:style-name="P42"><text:tab/><text:tab/><text:span text:style-name="T38">Eight-plank bridge - Animal ( 10 points )</text:span></text:p>
      <text:p text:style-name="P42"><text:tab/><text:tab/><text:span text:style-name="T40">Plain </text:span>Red Ribbon ( 5 points )</text:p>
      <text:p text:style-name="P42"><text:tab/><text:tab/>2 chaffs ( 1 point )</text:p>
      <text:p text:style-name="P45">Season: <text:span text:style-name="T38">June</text:span> – <text:span text:style-name="T38">Peony（牡丹「ぼたん」Botan）</text:span></text:p>
      <text:p text:style-name="P42"><text:tab/>Cards:</text:p>
      <text:p text:style-name="P42"><text:tab/><text:tab/><text:span text:style-name="T38">Butterflies - Animal ( 10 points )</text:span></text:p>
      <text:p text:style-name="P42"><text:tab/><text:tab/><text:span text:style-name="T40">Blue</text:span> Ribbon ( 5 points )</text:p>
      <text:p text:style-name="P42"><text:tab/><text:tab/>2 chaffs ( 1 point )</text:p>
      <text:p text:style-name="P45">Season: <text:span text:style-name="T38">July</text:span> – <text:span text:style-name="T38">Bush Clover（萩「はぎ」Hagi）</text:span></text:p>
      <text:p text:style-name="P42"><text:tab/>Cards:</text:p>
      <text:p text:style-name="P42"><text:tab/><text:tab/><text:span text:style-name="T38">Boar - Animal ( 10 points )</text:span></text:p>
      <text:p text:style-name="P42"><text:tab/><text:tab/><text:span text:style-name="T40">Plain </text:span>Red Ribbon ( 5 points )</text:p>
      <text:p text:style-name="P42"><text:tab/><text:tab/>2 chaffs ( 1 point )</text:p>
      <text:p text:style-name="P45">Season: <text:span text:style-name="T38">August</text:span> – <text:span text:style-name="T38">Susuki grass（芒「すすき」）</text:span></text:p>
      <text:p text:style-name="P42"><text:tab/>Cards:</text:p>
      <text:p text:style-name="P42"><text:tab/><text:tab/><text:span text:style-name="T38">Full moon - Light ( 20 points )</text:span></text:p>
      <text:p text:style-name="P42"><text:tab/><text:tab/><text:span text:style-name="T38">Geese - Animal ( 10 points )</text:span></text:p>
      <text:p text:style-name="P42"><text:tab/><text:tab/>2 chaffs ( 1 point )</text:p>
      <text:p text:style-name="P43">Season: <text:span text:style-name="T38">September</text:span> – <text:span text:style-name="T38">Chrysanthemum(菊「きく」Kiku)</text:span></text:p>
      <text:p text:style-name="P42"><text:tab/>Cards:</text:p>
      <text:p text:style-name="P42"><text:tab/><text:tab/><text:span text:style-name="T38">Sake cup - Animal ( 10 points )</text:span></text:p>
      <text:p text:style-name="P42"><text:tab/><text:tab/><text:span text:style-name="T40">Blue</text:span> Ribbon ( 5 points )</text:p>
      <text:p text:style-name="P42"><text:tab/><text:tab/>2 chaffs ( 1 point )</text:p>
      <text:p text:style-name="P45">Season: <text:span text:style-name="T38">October</text:span> – <text:span text:style-name="T38">Maple（紅葉「もみじ」Momiji）</text:span></text:p>
      <text:p text:style-name="P42"><text:tab/>Cards:</text:p>
      <text:p text:style-name="P42"><text:tab/><text:tab/><text:span text:style-name="T38">Deer - Animal ( 10 points )</text:span></text:p>
      <text:p text:style-name="P42"><text:tab/><text:tab/><text:span text:style-name="T41">Blue</text:span> Ribbon ( 5 points )</text:p>
      <text:p text:style-name="P42"><text:tab/><text:tab/>2 chaffs ( 1 point )</text:p>
      <text:p text:style-name="P45">Season: <text:span text:style-name="T38">November</text:span> – <text:span text:style-name="T38">Willow（柳「やなぎ」Yanagi）</text:span></text:p>
      <text:p text:style-name="P42"><text:tab/>Cards:</text:p>
      <text:p text:style-name="P42"><text:tab/><text:tab/><text:span text:style-name="T38">Ono no Michikaze / </text:span><text:span text:style-name="T42">Ono no Tōfū </text:span><text:span text:style-name="T38">/ Rainman card - Light ( 20 points )</text:span></text:p>
      <text:p text:style-name="P42"><text:tab/><text:tab/><text:span text:style-name="T38">Swallow - Animal ( 10 points )</text:span></text:p>
      <text:p text:style-name="P42"><text:tab/><text:tab/><text:span text:style-name="T41">Plain Red Ribbon ( 5 points )</text:span></text:p>
      <text:p text:style-name="P42"><text:tab/><text:tab/><text:span text:style-name="T41">Lightning / Demon - Chaff card</text:span></text:p>
      <text:p text:style-name="P45">Season: <text:span text:style-name="T38">December</text:span> – <text:span text:style-name="T38">Paulownia（桐「きり」Kiri）</text:span></text:p>
      <text:p text:style-name="P42"><text:tab/>Cards:</text:p>
      <text:p text:style-name="P42"><text:tab/><text:tab/><text:span text:style-name="T38">Phoenix </text:span><text:span text:style-name="T43">(鳳凰「ほうおう」Hōō)</text:span><text:span text:style-name="T38"> - </text:span><text:span text:style-name="T44">Light</text:span><text:span text:style-name="T38"> </text:span><text:span text:style-name="T44">( 20 points )</text:span></text:p>
      <text:p text:style-name="P42"><text:tab/><text:tab/><text:span text:style-name="T45">3 chaffs ( 1 point )</text:span></text:p>
      <text:p text:style-name="P3"><text:span text:style-name="T46">Winning combinations (</text:span>Yaku<text:span text:style-name="T46">)</text:span></text:p>
      <text:p text:style-name="P46">Dealt yaku:</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47">Japanese Name</text:p>
          </table:table-cell>
          <table:table-cell table:style-name="Table1.A1" office:value-type="string">
            <text:p text:style-name="P47">English Name</text:p>
          </table:table-cell>
          <table:table-cell table:style-name="Table1.A1" office:value-type="string">
            <text:p text:style-name="P47">Points awarded</text:p>
          </table:table-cell>
          <table:table-cell table:style-name="Table1.A1" office:value-type="string">
            <text:p text:style-name="P47">Definition</text:p>
          </table:table-cell>
        </table:table-row>
        <table:table-row>
          <table:table-cell table:style-name="Table1.A1" office:value-type="string">
            <text:p text:style-name="P48">手四「てし」Teshi</text:p>
          </table:table-cell>
          <table:table-cell table:style-name="Table1.A1" office:value-type="string">
            <text:p text:style-name="P49">Four Hands</text:p>
          </table:table-cell>
          <table:table-cell table:style-name="Table1.A1" office:value-type="string">
            <text:p text:style-name="P49">6 pts</text:p>
          </table:table-cell>
          <table:table-cell table:style-name="Table1.A1" office:value-type="string">
            <text:p text:style-name="P49">4 cards of the same season</text:p>
          </table:table-cell>
        </table:table-row>
        <table:table-row>
          <table:table-cell table:style-name="Table1.A1" office:value-type="string">
            <text:p text:style-name="P48">くっつき<text:span text:style-name="T47">　Kuttsuki</text:span></text:p>
          </table:table-cell>
          <table:table-cell table:style-name="Table1.A1" office:value-type="string">
            <text:p text:style-name="P49">Sticky</text:p>
          </table:table-cell>
          <table:table-cell table:style-name="Table1.A1" office:value-type="string">
            <text:p text:style-name="P49">6 pts</text:p>
          </table:table-cell>
          <table:table-cell table:style-name="Table1.A1" office:value-type="string">
            <text:p text:style-name="P49">4 pairs of cards with matching season</text:p>
          </table:table-cell>
        </table:table-row>
      </table:table>
      <text:p text:style-name="P46"/>
      <text:p text:style-name="P50">Formed yaku:</text:p>
      <table:table table:name="Table2" table:style-name="Table2">
        <table:table-column table:style-name="Table2.A" table:number-columns-repeated="3"/>
        <table:table-column table:style-name="Table2.D"/>
        <table:table-row>
          <table:table-cell table:style-name="Table2.A1" office:value-type="string">
            <text:p text:style-name="P51">Japanese Name</text:p>
          </table:table-cell>
          <table:table-cell table:style-name="Table2.A1" office:value-type="string">
            <text:p text:style-name="P51">English Name</text:p>
          </table:table-cell>
          <table:table-cell table:style-name="Table2.A1" office:value-type="string">
            <text:p text:style-name="P51">Points awarded</text:p>
          </table:table-cell>
          <table:table-cell table:style-name="Table2.A1" office:value-type="string">
            <text:p text:style-name="P51">Definition</text:p>
          </table:table-cell>
        </table:table-row>
        <table:table-row>
          <table:table-cell table:style-name="Table2.A1" office:value-type="string">
            <text:p text:style-name="P48">五光「ごこう」Gok<text:span text:style-name="T48">ō</text:span></text:p>
          </table:table-cell>
          <table:table-cell table:style-name="Table2.A1" office:value-type="string">
            <text:p text:style-name="P52">Five Lights</text:p>
          </table:table-cell>
          <table:table-cell table:style-name="Table2.A1" office:value-type="string">
            <text:p text:style-name="P53">10</text:p>
          </table:table-cell>
          <table:table-cell table:style-name="Table2.A1" office:value-type="string">
            <text:p text:style-name="P54">All 20 points cards</text:p>
          </table:table-cell>
        </table:table-row>
        <table:table-row>
          <table:table-cell table:style-name="Table2.A1" office:value-type="string">
            <text:p text:style-name="P48">四光「しこう」Shik<text:span text:style-name="T49">ō</text:span></text:p>
          </table:table-cell>
          <table:table-cell table:style-name="Table2.A1" office:value-type="string">
            <text:p text:style-name="P52">Four Lights</text:p>
          </table:table-cell>
          <table:table-cell table:style-name="Table2.A1" office:value-type="string">
            <text:p text:style-name="P53">8</text:p>
          </table:table-cell>
          <table:table-cell table:style-name="Table2.A1" office:value-type="string">
            <text:p text:style-name="P54">All 20 points cards EXCEPT Ono no Michikaze / Rainman card</text:p>
          </table:table-cell>
        </table:table-row>
        <table:table-row>
          <table:table-cell table:style-name="Table2.A1" office:value-type="string">
            <text:p text:style-name="P48">雨四光「あめしこう」Ameshik<text:span text:style-name="T49">ō</text:span></text:p>
          </table:table-cell>
          <table:table-cell table:style-name="Table2.A1" office:value-type="string">
            <text:p text:style-name="P52">Rainy Four Lights</text:p>
          </table:table-cell>
          <table:table-cell table:style-name="Table2.A1" office:value-type="string">
            <text:p text:style-name="P53">7</text:p>
          </table:table-cell>
          <table:table-cell table:style-name="Table2.A1" office:value-type="string">
            <text:p text:style-name="P54">3 20 points cards + Ono no Michikaze / Rainman card</text:p>
          </table:table-cell>
        </table:table-row>
        <table:table-row>
          <table:table-cell table:style-name="Table2.A1" office:value-type="string">
            <text:p text:style-name="P48">三光「さんこう」Sank<text:span text:style-name="T49">ō</text:span></text:p>
          </table:table-cell>
          <table:table-cell table:style-name="Table2.A1" office:value-type="string">
            <text:p text:style-name="P52">Three Lights</text:p>
          </table:table-cell>
          <table:table-cell table:style-name="Table2.A1" office:value-type="string">
            <text:p text:style-name="P53">5</text:p>
          </table:table-cell>
          <table:table-cell table:style-name="Table2.A1" office:value-type="string">
            <text:p text:style-name="P54">3 20 points cards</text:p>
            <text:p text:style-name="P54">EXCEPT Ono no Michikaze / Rainman card</text:p>
          </table:table-cell>
        </table:table-row>
        <table:table-row>
          <table:table-cell table:style-name="Table2.A1" office:value-type="string">
            <text:p text:style-name="P48">月見酒「つきみざけ」Tsukimizake</text:p>
          </table:table-cell>
          <table:table-cell table:style-name="Table2.A1" office:value-type="string">
            <text:p text:style-name="P52">Moon Viewing</text:p>
          </table:table-cell>
          <table:table-cell table:style-name="Table2.A1" office:value-type="string">
            <text:p text:style-name="P53">5</text:p>
          </table:table-cell>
          <table:table-cell table:style-name="Table2.A1" office:value-type="string">
            <text:p text:style-name="P54">Moon card +</text:p>
            <text:p text:style-name="P54">Sake card</text:p>
          </table:table-cell>
        </table:table-row>
        <table:table-row>
          <table:table-cell table:style-name="Table2.A1" office:value-type="string">
            <text:p text:style-name="P48">花見酒「はなみざけ」Hanamizake</text:p>
          </table:table-cell>
          <table:table-cell table:style-name="Table2.A1" office:value-type="string">
            <text:p text:style-name="P52">Cherry Blossoms Viewing</text:p>
          </table:table-cell>
          <table:table-cell table:style-name="Table2.A1" office:value-type="string">
            <text:p text:style-name="P53">5</text:p>
          </table:table-cell>
          <table:table-cell table:style-name="Table2.A1" office:value-type="string">
            <text:p text:style-name="P54">Curtain card +</text:p>
            <text:p text:style-name="P54">Sake card</text:p>
          </table:table-cell>
        </table:table-row>
        <table:table-row>
          <table:table-cell table:style-name="Table2.A1" office:value-type="string">
            <text:p text:style-name="P48">猪鹿蝶「いのしかちょう」Inoshikach<text:span text:style-name="T49">ō</text:span></text:p>
          </table:table-cell>
          <table:table-cell table:style-name="Table2.A1" office:value-type="string">
            <text:p text:style-name="P52">Boar, deer, butterflies</text:p>
          </table:table-cell>
          <table:table-cell table:style-name="Table2.A1" office:value-type="string">
            <text:p text:style-name="P53">5</text:p>
          </table:table-cell>
          <table:table-cell table:style-name="Table2.A1" office:value-type="string">
            <text:p text:style-name="P54">Boar, deer and butterflies cards</text:p>
          </table:table-cell>
        </table:table-row>
        <table:table-row>
          <table:table-cell table:style-name="Table2.A1" office:value-type="string">
            <text:p text:style-name="P48">タネ<text:span text:style-name="T48">　Tane</text:span></text:p>
          </table:table-cell>
          <table:table-cell table:style-name="Table2.A1" office:value-type="string">
            <text:p text:style-name="P52">Animals</text:p>
          </table:table-cell>
          <table:table-cell table:style-name="Table2.A1" office:value-type="string">
            <text:p text:style-name="P53">1 <text:span text:style-name="T50">point + 1 point for each additional 10 point card</text:span></text:p>
          </table:table-cell>
          <table:table-cell table:style-name="Table2.A1" office:value-type="string">
            <text:p text:style-name="P55">5 animal cards</text:p>
          </table:table-cell>
        </table:table-row>
        <table:table-row>
          <table:table-cell table:style-name="Table2.A1" office:value-type="string">
            <text:p text:style-name="P48">赤短*青短の重複「あかたんあおたんのちょうふく」Akatan-Aotan-no-ch<text:span text:style-name="T49">ō</text:span>fuku</text:p>
          </table:table-cell>
          <table:table-cell table:style-name="Table2.A1" office:value-type="string">
            <text:p text:style-name="P52">Red poetry ribbons, Blue ribbons combination</text:p>
          </table:table-cell>
          <table:table-cell table:style-name="Table2.A1" office:value-type="string">
            <text:p text:style-name="P53">10</text:p>
          </table:table-cell>
          <table:table-cell table:style-name="Table2.A1" office:value-type="string">
            <text:p text:style-name="P55">All red poetry and blue ribbon cards</text:p>
          </table:table-cell>
        </table:table-row>
        <table:table-row>
          <table:table-cell table:style-name="Table2.A1" office:value-type="string">
            <text:p text:style-name="P48">赤短</text:p>
          </table:table-cell>
          <table:table-cell table:style-name="Table2.A1" office:value-type="string">
            <text:p text:style-name="P52">Red poetry combination</text:p>
          </table:table-cell>
          <table:table-cell table:style-name="Table2.A1" office:value-type="string">
            <text:p text:style-name="P53">5</text:p>
          </table:table-cell>
          <table:table-cell table:style-name="Table2.A1" office:value-type="string">
            <text:p text:style-name="P55">All red poetry cards</text:p>
          </table:table-cell>
        </table:table-row>
        <table:table-row>
          <table:table-cell table:style-name="Table2.A1" office:value-type="string">
            <text:p text:style-name="P48">青短</text:p>
          </table:table-cell>
          <table:table-cell table:style-name="Table2.A1" office:value-type="string">
            <text:p text:style-name="P52">Blue ribbons</text:p>
          </table:table-cell>
          <table:table-cell table:style-name="Table2.A1" office:value-type="string">
            <text:p text:style-name="P53">5</text:p>
          </table:table-cell>
          <table:table-cell table:style-name="Table2.A1" office:value-type="string">
            <text:p text:style-name="P55">All blue ribbon cards</text:p>
          </table:table-cell>
        </table:table-row>
        <table:table-row>
          <table:table-cell table:style-name="Table2.A1" office:value-type="string">
            <text:p text:style-name="P48">短冊「たんざく」</text:p>
          </table:table-cell>
          <table:table-cell table:style-name="Table2.A1" office:value-type="string">
            <text:p text:style-name="P52">Poetry Slips</text:p>
          </table:table-cell>
          <table:table-cell table:style-name="Table2.A1" office:value-type="string">
            <text:p text:style-name="P53">1 <text:span text:style-name="T50">point + 1 point for each additional 5 point card</text:span></text:p>
          </table:table-cell>
          <table:table-cell table:style-name="Table2.A1" office:value-type="string">
            <text:p text:style-name="P54">5 ribbon slips</text:p>
          </table:table-cell>
        </table:table-row>
        <table:table-row>
          <table:table-cell table:style-name="Table2.A1" office:value-type="string">
            <text:p text:style-name="P48">カス</text:p>
          </table:table-cell>
          <table:table-cell table:style-name="Table2.A1" office:value-type="string">
            <text:p text:style-name="P52">Kasu / Chaffs</text:p>
          </table:table-cell>
          <table:table-cell table:style-name="Table2.A1" office:value-type="string">
            <text:p text:style-name="P53">1 <text:span text:style-name="T50">point</text:span> <text:span text:style-name="T50">+ 1 point for each additional 1pt card</text:span></text:p>
          </table:table-cell>
          <table:table-cell table:style-name="Table2.A1" office:value-type="string">
            <text:p text:style-name="P55">10 chaff cards</text:p>
          </table:table-cell>
        </table:table-row>
      </table:table>
      <text:p text:style-name="P56"/>
      <text:p text:style-name="P1"/>
      <text:p text:style-name="P57">Page 9 / X [ Return to Summary ]</text:p>
      <text:p text:style-name="Title">CLI game commands</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adornments="Bold" style:font-pitch="fixed"/>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ospace1" fo:font-family="Monospace" style:font-style-name="Regular" style:font-pitch="fixed" fo:font-size="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sian="Noto Serif CJK JP" style:font-family-asian="'Noto Serif CJK JP'" style:font-style-name-asian="Regular" style:font-family-generic-asian="roman" style:font-pitch-asian="variable" style:font-size-asian="15pt" style:language-asian="ja" style:country-asian="JP"/>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text-properties style:font-name="Monospace1" fo:font-family="Monospace" style:font-style-name="Regular" style:font-pitch="fixed" fo:font-size="12pt"/>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Title" style:family="paragraph" style:parent-style-name="Heading" style:next-style-name="Text_20_body" style:class="chapter">
      <loext:graphic-properties draw:fill="none" draw:fill-color="#333333"/>
      <style:paragraph-properties fo:text-align="start" style:justify-single-word="false" fo:background-color="transparent">
        <style:tab-stops/>
      </style:paragraph-properties>
      <style:text-properties fo:color="#ffffff" loext:opacity="100%" style:font-name="Monospace" fo:font-family="Monospace" style:font-style-name="Bold" style:font-pitch="fixed" fo:font-size="32pt" fo:font-weight="bold" officeooo:rsid="002b6bd6" style:font-size-asian="32pt" style:font-weight-asian="bold" style:font-size-complex="32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style:font-name="Monospace1" fo:font-family="Monospace" style:font-style-name="Regular" style:font-pitch="fixed" fo:font-size="20pt" style:font-name-asian="Noto Serif CJK JP" style:font-family-asian="'Noto Serif CJK JP'" style:font-style-name-asian="Regular" style:font-family-generic-asian="roman" style:font-pitch-asian="variable" style:font-size-asian="22pt" style:language-asian="ja" style:country-asian="JP"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1in" fo:margin-bottom="0.1in" fo:margin-left="0.2in" fo:margin-right="0.1in" fo:background-color="#000000" style:writing-mode="lr-tb" style:layout-grid-color="#c0c0c0" style:layout-grid-lines="20" style:layout-grid-base-height="0.278in" style:layout-grid-ruby-height="0.139in" style:layout-grid-mode="none" style:layout-grid-ruby-below="false" style:layout-grid-print="true" style:layout-grid-display="true" draw:fill="solid" draw:fill-color="#000000" draw:gradient-step-count="0" draw:opacity="100%" style:footnote-max-height="0in" loext:margin-gutter="0.1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gradient-step-count="0" draw:opacity="100%"/>
    </style:style>
    <style:style style:name="Mdp2" style:family="drawing-page">
      <style:drawing-page-properties draw:background-size="full"/>
    </style:style>
  </office:automatic-styles>
  <office:master-styles>
    <style:master-page style:name="Standard" style:page-layout-name="Mpm1" draw:style-name="Mdp1"/>
    <style:master-page style:name="Index" style:page-layout-name="Mpm2" draw:style-name="Mdp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18:13:33.859589147</meta:creation-date>
    <meta:editing-duration>PT2M14S</meta:editing-duration>
    <meta:editing-cycles>2</meta:editing-cycles>
    <meta:generator>LibreOffice/25.8.3.2$Linux_X86_64 LibreOffice_project/580$Build-2</meta:generator>
    <dc:date>2025-11-23T18:15:11.875049895</dc:date>
    <meta:document-statistic meta:table-count="2" meta:image-count="0" meta:object-count="0" meta:page-count="1" meta:paragraph-count="183" meta:word-count="1531" meta:character-count="7155" meta:non-whitespace-character-count="5916"/>
  </office:meta>
</office:document-meta>
</file>